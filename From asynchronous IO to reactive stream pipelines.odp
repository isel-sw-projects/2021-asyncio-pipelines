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64403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9">
      <style:graphic-properties draw:fill="none" draw:stroke="solid" svg:stroke-width="0.01389in" svg:stroke-color="#000000" svg:stroke-opacity="100%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73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171f" fo:font-family="Wingdings" style:font-pitch="variable" fo:font-size="100%"/>
      </text:list-level-style-bullet>
    </text:list-style>
    <text:list-style style:name="a114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8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98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96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53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171f" fo:font-family="Wingdings" style:font-pitch="variable" fo:font-size="100%"/>
      </text:list-level-style-bullet>
    </text:list-style>
    <text:list-style style:name="a110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88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964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3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67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3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59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171f" fo:font-family="Wingdings" style:font-pitch="variable" fo:font-size="100%"/>
      </text:list-level-style-bullet>
    </text:list-style>
    <text:list-style style:name="a110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1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3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1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18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15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8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5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7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11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3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62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171f" fo:font-family="Wingdings" style:font-pitch="variable" fo:font-size="100%"/>
      </text:list-level-style-bullet>
    </text:list-style>
    <text:list-style style:name="a97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8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13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11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66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171f" fo:font-family="Wingdings" style:font-pitch="variable" fo:font-size="100%"/>
      </text:list-level-style-bullet>
    </text:list-style>
    <text:list-style style:name="a97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1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69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171f" fo:font-family="Wingdings" style:font-pitch="variable" fo:font-size="100%"/>
      </text:list-level-style-bullet>
    </text:list-style>
    <text:list-style style:name="a95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97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2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95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24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27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0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0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00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0d0d0d" fo:font-family="Wingdings" style:font-pitch="variable" fo:font-size="100%"/>
      </text:list-level-style-bullet>
    </text:list-style>
    <text:list-style style:name="a116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9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16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1" draw:style-name="a922" draw:master-page-name="Master1-Layout1-title-Diapositivo-de-Título" presentation:presentation-page-layout-name="Master1-PPL1" draw:id="Slide-256">
        <draw:frame draw:id="id110" presentation:style-name="a926" draw:name="Título 1" svg:x="0.88in" svg:y="1.05233in" svg:width="12.19217in" svg:height="2.85648in" presentation:class="title" presentation:placeholder="false">
          <draw:text-box>
            <text:p text:style-name="a925" text:class-names="" text:cond-style-name=""><text:span text:style-name="a923" text:class-names="">From asynchronous IO to reactive stream pipelines</text:span><text:span text:style-name="a924" text:class-names=""/></text:p>
          </draw:text-box>
          <svg:title/>
          <svg:desc/>
        </draw:frame>
        <draw:frame draw:id="id111" presentation:style-name="a938" draw:name="Subtítulo 2" svg:x="0.88in" svg:y="4.09875in" svg:width="6.28495in" svg:height="2.16929in" presentation:class="subtitle" presentation:placeholder="false">
          <draw:text-box>
            <text:p text:style-name="a928" text:class-names="" text:cond-style-name=""><text:span text:style-name="a927" text:class-names="">Mestrando:</text:span></text:p>
            <text:p text:style-name="a930" text:class-names="" text:cond-style-name=""><text:span text:style-name="a929" text:class-names="">Diogo Paulo de Oliveira Rodrigues</text:span></text:p>
            <text:p text:style-name="a932" text:class-names="" text:cond-style-name=""><text:span text:style-name="a931" text:class-names=""/></text:p>
            <text:p text:style-name="a934" text:class-names="" text:cond-style-name=""><text:span text:style-name="a933" text:class-names="">Orientador:<text:s text:c="1"/></text:span></text:p>
            <text:p text:style-name="a937" text:class-names="" text:cond-style-name=""><text:span text:style-name="a935" text:class-names="">Doutor Fernando Miguel Gamboa de Carvalho</text:span><text:span text:style-name="a936" text:class-names=""/></text:p>
          </draw:text-box>
          <svg:title/>
          <svg:desc/>
        </draw:frame>
        <presentation:notes draw:style-name="a945">
          <draw:page-thumbnail draw:page-number="1" svg:x="0.75in" svg:y="1.25in" svg:width="6in" svg:height="3.375in" presentation:class="page" draw:id="id112" presentation:style-name="a939" draw:name="Marcador de Posição da Imagem do Diapositivo 1">
            <svg:title/>
            <svg:desc/>
          </draw:page-thumbnail>
          <draw:frame draw:id="id113" presentation:style-name="a940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944" draw:name="Marcador de Posição do Número do Diapositivo 3" svg:x="4.24826in" svg:y="9.49826in" svg:width="3.25in" svg:height="0.50174in">
            <draw:text-box>
              <text:p text:style-name="a943" text:class-names="" text:cond-style-name=""><text:span text:style-name="a941" text:class-names=""><text:page-number style:num-format="1" text:fixed="false"/></text:span><text:span text:style-name="a942" text:class-names=""/></text:p>
            </draw:text-box>
            <svg:title/>
            <svg:desc/>
          </draw:frame>
        </presentation:notes>
      </draw:page>
      <draw:page draw:name="Slide2" draw:style-name="a946" draw:master-page-name="Master1-Layout2-obj-Título-e-Objeto" presentation:presentation-page-layout-name="Master1-PPL2" draw:id="Slide-257">
        <draw:frame draw:id="id115" presentation:style-name="a950" draw:name="Título 1" svg:x="1.2in" svg:y="0.31343in" svg:width="11in" svg:height="1.58657in" presentation:class="title" presentation:placeholder="false">
          <draw:text-box>
            <text:p text:style-name="a949" text:class-names="" text:cond-style-name=""><text:span text:style-name="a947" text:class-names="">Contexto</text:span><text:span text:style-name="a948" text:class-names=""/></text:p>
          </draw:text-box>
          <svg:title/>
          <svg:desc/>
        </draw:frame>
        <draw:frame draw:id="id128" presentation:style-name="a989" draw:name="Marcador de Posição de Conteúdo 2" svg:x="1.2in" svg:y="2.01852in" svg:width="11in" svg:height="4.91626in" presentation:class="outline" presentation:placeholder="false">
          <draw:text-box>
            <text:list text:style-name="a953">
              <text:list-item>
                <text:p text:style-name="a952" text:class-names="" text:cond-style-name="" text:id="id116"><text:span text:style-name="a951" text:class-names="">Motivação histórica</text:span></text:p>
              </text:list-item>
            </text:list>
            <text:list text:style-name="a956">
              <text:list-item>
                <text:p text:style-name="a955" text:class-names="" text:cond-style-name="" text:id="id117"><text:span text:style-name="a954" text:class-names=""/></text:p>
              </text:list-item>
            </text:list>
            <text:list text:style-name="a961">
              <text:list-item>
                <text:p text:style-name="a960" text:class-names="" text:cond-style-name="" text:id="id118"><text:span text:style-name="a957" text:class-names="">Código</text:span><text:span text:style-name="a958" text:class-names=""><text:s text:c="1"/></text:span><text:span text:style-name="a959" text:class-names="">tendencialmente complexo</text:span></text:p>
              </text:list-item>
            </text:list>
            <text:list text:style-name="a964">
              <text:list-item>
                <text:p text:style-name="a963" text:class-names="" text:cond-style-name="" text:id="id119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 text:id="id120"><text:span text:style-name="a965" text:class-names="">Difícil manutenção</text:span></text:p>
              </text:list-item>
            </text:list>
            <text:list text:style-name="a970">
              <text:list-item>
                <text:p text:style-name="a969" text:class-names="" text:cond-style-name="" text:id="id121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 text:id="id122"><text:span text:style-name="a971" text:class-names="">Fraco desempenho</text:span></text:p>
              </text:list-item>
            </text:list>
            <text:list text:style-name="a976">
              <text:list-item>
                <text:p text:style-name="a975" text:class-names="" text:cond-style-name="" text:id="id123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 text:id="id124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 text:id="id125"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 text:id="id126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 text:id="id127"><text:span text:style-name="a98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990" draw:master-page-name="Master1-Layout2-obj-Título-e-Objeto" presentation:presentation-page-layout-name="Master1-PPL2" draw:id="Slide-258">
        <draw:frame draw:id="id129" presentation:style-name="a994" draw:name="Título 1" svg:x="1.2in" svg:y="0.31343in" svg:width="11in" svg:height="1.58657in" presentation:class="title" presentation:placeholder="false">
          <draw:text-box>
            <text:p text:style-name="a993" text:class-names="" text:cond-style-name=""><text:span text:style-name="a991" text:class-names="">Problemas relacionados<text:s text:c="1"/></text:span><text:span text:style-name="a992" text:class-names=""/></text:p>
          </draw:text-box>
          <svg:title/>
          <svg:desc/>
        </draw:frame>
        <draw:frame draw:id="id144" presentation:style-name="a1043" draw:name="Marcador de Posição de Conteúdo 2" svg:x="1.2in" svg:y="2.01852in" svg:width="11in" svg:height="4.4in" presentation:class="outline" presentation:placeholder="false">
          <draw:text-box>
            <text:list text:style-name="a1003">
              <text:list-item>
                <text:p text:style-name="a1002" text:class-names="" text:cond-style-name="" text:id="id130"><text:span text:style-name="a995" text:class-names="">Ambientes de</text:span><text:span text:style-name="a996" text:class-names=""><text:s text:c="1"/></text:span><text:span text:style-name="a997" text:class-names="">desenvolvimento</text:span><text:span text:style-name="a998" text:class-names=""><text:s text:c="1"/></text:span><text:span text:style-name="a999" text:class-names="">divers</text:span><text:span text:style-name="a1000" text:class-names="">o</text:span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 text:id="id131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 text:id="id132"><text:span text:style-name="a1007" text:class-names="">Falta de normalização</text:span></text:p>
              </text:list-item>
            </text:list>
            <text:list text:style-name="a1012">
              <text:list-item>
                <text:p text:style-name="a1011" text:class-names="" text:cond-style-name="" text:id="id133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 text:id="id134"><text:span text:style-name="a1013" text:class-names="">Facilita más práticas</text:span></text:p>
              </text:list-item>
            </text:list>
            <text:list text:style-name="a1018">
              <text:list-item>
                <text:p text:style-name="a1017" text:class-names="" text:cond-style-name="" text:id="id135"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 text:id="id136"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 text:id="id137"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 text:id="id138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 text:id="id139"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 text:id="id140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 text:id="id141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 text:id="id142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 text:id="id143"><text:span text:style-name="a104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1044" draw:master-page-name="Master1-Layout2-obj-Título-e-Objeto" presentation:presentation-page-layout-name="Master1-PPL2" draw:id="Slide-259">
        <draw:frame draw:id="id145" presentation:style-name="a1048" draw:name="Título 1" svg:x="1.2in" svg:y="0.31343in" svg:width="11in" svg:height="1.58657in" presentation:class="title" presentation:placeholder="false">
          <draw:text-box>
            <text:p text:style-name="a1047" text:class-names="" text:cond-style-name=""><text:span text:style-name="a1045" text:class-names="">Soluções</text:span><text:span text:style-name="a1046" text:class-names=""/></text:p>
          </draw:text-box>
          <svg:title/>
          <svg:desc/>
        </draw:frame>
        <draw:frame draw:id="id146" presentation:style-name="a1074" draw:name="Marcador de Posição de Conteúdo 2" svg:x="1.2in" svg:y="2.01852in" svg:width="11in" svg:height="4.4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49" text:class-names="">Mecanismos de simplificação de código “</text:span><text:span text:style-name="a1050" text:class-names="">syntax</text:span><text:span text:style-name="a1051" text:class-names=""><text:s text:c="1"/>sugar”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Normalização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Definição de boas práticas</text:span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0" text:class-names="">Sequenciação de operações através de pipelines</text:span><text:span text:style-name="a1071" text:class-names=""/></text:p>
              </text:list-item>
            </text:list>
          </draw:text-box>
          <svg:title/>
          <svg:desc/>
        </draw:frame>
      </draw:page>
      <draw:page draw:name="Slide5" draw:style-name="a1075" draw:master-page-name="Master1-Layout2-obj-Título-e-Objeto" presentation:presentation-page-layout-name="Master1-PPL2" draw:id="Slide-260">
        <draw:frame draw:id="id147" presentation:style-name="a1080" draw:name="Título 1" svg:x="1.2in" svg:y="0.31343in" svg:width="11in" svg:height="1.58657in" presentation:class="title" presentation:placeholder="false">
          <draw:text-box>
            <text:p text:style-name="a1079" text:class-names="" text:cond-style-name=""><text:span text:style-name="a1076" text:class-names="">Objectivos</text:span><text:span text:style-name="a1077" text:class-names=""><text:s text:c="1"/>da tese</text:span><text:span text:style-name="a1078" text:class-names=""/></text:p>
          </draw:text-box>
          <svg:title/>
          <svg:desc/>
        </draw:frame>
        <draw:frame draw:id="id148" presentation:style-name="a1121" draw:name="Marcador de Posição de Conteúdo 2" svg:x="1.2in" svg:y="2.01852in" svg:width="11in" svg:height="4.4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4" text:class-names="">Benchmark</text:span><text:span text:style-name="a1085" text:class-names=""><text:s text:c="1"/>das<text:s text:c="1"/></text:span><text:span text:style-name="a1086" text:class-names="">tecnológias</text:span><text:span text:style-name="a1087" text:class-names=""><text:s text:c="1"/>que se propõem a resolver os problemas enumerados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093" text:class-names="">Comparação de desempenho</text:span><text:span text:style-name="a1094" text:class-names=""><text:s text:c="1"/></text:span><text:span text:style-name="a1095" text:class-names="">entre</text:span><text:span text:style-name="a1096" text:class-names=""><text:s text:c="1"/></text:span><text:span text:style-name="a1097" text:class-names="">várias</text:span><text:span text:style-name="a1098" text:class-names=""><text:s text:c="1"/></text:span><text:span text:style-name="a1099" text:class-names="">soluções</text:span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Apresentação de resultados e reflexão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6" draw:style-name="a1122" draw:master-page-name="Master1-Layout2-obj-Título-e-Objeto" presentation:presentation-page-layout-name="Master1-PPL2" draw:id="Slide-261">
        <draw:frame draw:id="id149" presentation:style-name="a1126" draw:name="Título 1" svg:x="1.2in" svg:y="0.31343in" svg:width="11in" svg:height="1.58657in" presentation:class="title" presentation:placeholder="false">
          <draw:text-box>
            <text:p text:style-name="a1125" text:class-names="" text:cond-style-name=""><text:span text:style-name="a1123" text:class-names="">Benchmark</text:span><text:span text:style-name="a1124" text:class-names=""/></text:p>
          </draw:text-box>
          <svg:title/>
          <svg:desc/>
        </draw:frame>
        <draw:frame draw:id="id150" presentation:style-name="a1169" draw:name="Marcador de Posição de Conteúdo 2" svg:x="1.2in" svg:y="2.01852in" svg:width="11in" svg:height="4.4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27" text:class-names="">Reactive</text:span><text:span text:style-name="a1128" text:class-names=""><text:s text:c="1"/></text:span><text:span text:style-name="a1129" text:class-names="">streams</text:span><text:span text:style-name="a1130" text:class-names=""><text:s text:c="1"/>e.g.<text:s text:c="1"/></text:span><text:span text:style-name="a1131" text:class-names="">projecto</text:span><text:span text:style-name="a1132" text:class-names=""><text:s text:c="1"/></text:span><text:span text:style-name="a1133" text:class-names="">ReactiveX</text:span><text:span text:style-name="a1134" text:class-names="">, JAVA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0" text:class-names="">DotNet</text:span><text:span text:style-name="a1141" text:class-names=""><text:s text:c="1"/></text:span><text:span text:style-name="a1142" text:class-names="">Asynchronous</text:span><text:span text:style-name="a1143" text:class-names=""><text:s text:c="1"/></text:span><text:span text:style-name="a1144" text:class-names="">Enumerables</text:span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1" text:class-names="">Javascript</text:span><text:span text:style-name="a1152" text:class-names=""><text:s text:c="1"/></text:span><text:span text:style-name="a1153" text:class-names="">Asynchronous</text:span><text:span text:style-name="a1154" text:class-names=""><text:s text:c="1"/></text:span><text:span text:style-name="a1155" text:class-names="">Enumerables</text:span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2" text:class-names=""><text:s text:c="1"/></text:span><text:span text:style-name="a1163" text:class-names="">Kotlin</text:span><text:span text:style-name="a1164" text:class-names=""><text:s text:c="1"/></text:span><text:span text:style-name="a1165" text:class-names="">Flow</text:span><text:span text:style-name="a1166" text:class-names=""/></text:p>
              </text:list-item>
            </text:list>
          </draw:text-box>
          <svg:title/>
          <svg:desc/>
        </draw:frame>
      </draw:page>
      <draw:page draw:name="Slide7" draw:style-name="a1170" draw:master-page-name="Master1-Layout2-obj-Título-e-Objeto" presentation:presentation-page-layout-name="Master1-PPL2" draw:id="Slide-262">
        <draw:frame draw:id="id151" presentation:style-name="a1174" draw:name="Título 1" svg:x="1.2in" svg:y="0.31343in" svg:width="11in" svg:height="1.58657in" presentation:class="title" presentation:placeholder="false">
          <draw:text-box>
            <text:p text:style-name="a1173" text:class-names="" text:cond-style-name=""><text:span text:style-name="a1171" text:class-names="">Conclusões</text:span><text:span text:style-name="a1172" text:class-names=""/></text:p>
          </draw:text-box>
          <svg:title/>
          <svg:desc/>
        </draw:frame>
        <draw:frame draw:id="id152" presentation:style-name="a1175" draw:name="Marcador de Posição de Conteúdo 4" svg:x="1.2in" svg:y="2.01852in" svg:width="11in" svg:height="4.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ítulo e Obje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Cabeçalho da Secção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Conteúdo Duplo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çã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ó Títu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Em branco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údo com Legend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m com Legend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ítulo e Texto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ítulo Vertical e Texto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1" style:display-name="Separator_2">
      <presentation:placeholder presentation:object="outline" svg:x="4.33013in" svg:y="4.38889in" svg:width="4.73656in" svg:height="0.40391in"/>
      <presentation:placeholder presentation:object="outline" svg:x="4.33013in" svg:y="2.59524in" svg:width="4.73656in" svg:height="1.55504in"/>
      <presentation:placeholder presentation:object="page-number" svg:x="12.07229in" svg:y="7.05912in" svg:width="0.73674in" svg:height="0.23959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620" xlink:href="media/image1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bd582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e48312" draw:opacity="100%" draw:stroke="non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bd582c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e48312" draw:opacity="100%" draw:stroke="none"/>
    </style:style>
    <style:style style:family="graphic" style:name="a674">
      <style:graphic-properties draw:fill="none" draw:stroke="solid" svg:stroke-width="0.00694in" svg:stroke-color="#7f7f7f" svg:stroke-opacity="100%" svg:stroke-linecap="butt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bd582c" draw:opacity="100%" draw:stroke="none"/>
    </style:style>
    <style:style style:family="graphic" style:name="a256">
      <style:graphic-properties draw:fill="solid" draw:fill-color="#e48312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bd582c" draw:opacity="100%" draw:stroke="none"/>
    </style:style>
    <style:style style:family="graphic" style:name="a491">
      <style:graphic-properties draw:fill="solid" draw:fill-color="#e48312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bd582c" draw:opacity="10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bd582c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solid" draw:fill-color="#e48312" draw:opacity="100%" draw:stroke="non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solid" draw:fill-color="#bd582c" draw:opacity="100%" draw:stroke="none"/>
    </style:style>
    <style:style style:family="paragraph" style:name="a7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solid" draw:fill-color="#e48312" draw:opacity="100%" draw:stroke="none"/>
    </style:style>
    <style:style style:family="presentation" style:name="a7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bd582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e48312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ulish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.0000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.00003in" fo:margin-left="0.5000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.00003in" fo:margin-left="1.0000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.00003in" fo:margin-left="1.5000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.00003in" fo:margin-left="2.000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bd582c" draw:opacity="100%" draw:stroke="none"/>
    </style:style>
    <style:style style:family="graphic" style:name="a612">
      <style:graphic-properties draw:fill="solid" draw:fill-color="#e48312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0" style:parent-style-name="Graphics">
      <style:graphic-properties draw:fill="none" draw:stroke="non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5in" fo:padding-bottom="0.05in" fo:padding-left="0.5in" fo:padding-right="0in" draw:textarea-vertical-align="top" draw:textarea-horizontal-align="left" draw:fill="bitmap" draw:fill-image-name="a620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 style:parent-style-name="Graphics">
      <style:graphic-properties draw:fill="none" draw:stroke="none"/>
    </style:style>
    <style:style style:family="text" style:name="a8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.138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bd582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e48312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1f1f1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1.33333in" style:font-size-asian="1.33333in" style:font-size-complex="1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solid" draw:fill-color="#bd582c" draw:opacity="100%" draw:stroke="none"/>
    </style:style>
    <style:style style:family="graphic" style:name="a438">
      <style:graphic-properties draw:fill="solid" draw:fill-color="#e48312" draw:opacity="100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007in"/>
      </text:list-level-style-number>
      <text:list-level-style-number text:level="7" style:num-format="">
        <style:list-level-properties text:space-before="3.25008in"/>
      </text:list-level-style-number>
      <text:list-level-style-number text:level="8" style:num-format="">
        <style:list-level-properties text:space-before="3.75009in"/>
      </text:list-level-style-number>
      <text:list-level-style-number text:level="9" style:num-format="">
        <style:list-level-properties text:space-before="4.25011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007in"/>
      </text:list-level-style-number>
      <text:list-level-style-number text:level="7" style:num-format="">
        <style:list-level-properties text:space-before="3.25008in"/>
      </text:list-level-style-number>
      <text:list-level-style-number text:level="8" style:num-format="">
        <style:list-level-properties text:space-before="3.75009in"/>
      </text:list-level-style-number>
      <text:list-level-style-number text:level="9" style:num-format="">
        <style:list-level-properties text:space-before="4.25011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007in"/>
      </text:list-level-style-number>
      <text:list-level-style-number text:level="7" style:num-format="">
        <style:list-level-properties text:space-before="3.25008in"/>
      </text:list-level-style-number>
      <text:list-level-style-number text:level="8" style:num-format="">
        <style:list-level-properties text:space-before="3.75009in"/>
      </text:list-level-style-number>
      <text:list-level-style-number text:level="9" style:num-format="">
        <style:list-level-properties text:space-before="4.25011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007in"/>
      </text:list-level-style-number>
      <text:list-level-style-number text:level="7" style:num-format="">
        <style:list-level-properties text:space-before="3.25008in"/>
      </text:list-level-style-number>
      <text:list-level-style-number text:level="8" style:num-format="">
        <style:list-level-properties text:space-before="3.75009in"/>
      </text:list-level-style-number>
      <text:list-level-style-number text:level="9" style:num-format="">
        <style:list-level-properties text:space-before="4.25011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007in"/>
      </text:list-level-style-number>
      <text:list-level-style-number text:level="7" style:num-format="">
        <style:list-level-properties text:space-before="3.25008in"/>
      </text:list-level-style-number>
      <text:list-level-style-number text:level="8" style:num-format="">
        <style:list-level-properties text:space-before="3.75009in"/>
      </text:list-level-style-number>
      <text:list-level-style-number text:level="9" style:num-format="">
        <style:list-level-properties text:space-before="4.25011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007in"/>
      </text:list-level-style-number>
      <text:list-level-style-number text:level="7" style:num-format="">
        <style:list-level-properties text:space-before="3.25008in"/>
      </text:list-level-style-number>
      <text:list-level-style-number text:level="8" style:num-format="">
        <style:list-level-properties text:space-before="3.75009in"/>
      </text:list-level-style-number>
      <text:list-level-style-number text:level="9" style:num-format="">
        <style:list-level-properties text:space-before="4.25011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007in"/>
      </text:list-level-style-number>
      <text:list-level-style-number text:level="7" style:num-format="">
        <style:list-level-properties text:space-before="3.25008in"/>
      </text:list-level-style-number>
      <text:list-level-style-number text:level="8" style:num-format="">
        <style:list-level-properties text:space-before="3.75009in"/>
      </text:list-level-style-number>
      <text:list-level-style-number text:level="9" style:num-format="">
        <style:list-level-properties text:space-before="4.25011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Retrospetiva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que para editar o estilo de título do Modelo Global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 para editar os estilos do texto de Modelo Global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í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í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Marcador de Posição do Cabeçalho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Marcador de Posição da Dat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Marcador de Posição da Imagem do Diapositivo 3">
          <svg:title/>
          <svg:desc/>
        </draw:page-thumbnail>
        <draw:frame draw:id="id11" presentation:style-name="a61" draw:name="Marcador de Posição de Nota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 para editar os estilos do texto de Modelo Global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gundo ní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Quinto ní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Marcador de Posição do Rodapé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Marcador de Posição do Número do Diapositivo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Clique para editar o estilo de título do Modelo Global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Clique para editar o estilo de subtítulo do Modelo Global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/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Marcador de Posição do Cabeçalho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Marcador de Posição da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Marcador de Posição da Imagem do Diapositivo 3">
          <svg:title/>
          <svg:desc/>
        </draw:page-thumbnail>
        <draw:frame draw:id="id11" presentation:style-name="a118" draw:name="Marcador de Posição de Nota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que para editar os estilos do texto de Modelo Global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gundo ní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Quinto nível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Marcador de Posição do Rodapé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Marcador de Posição do Número do Diapositivo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Clique para editar o estilo de título do Modelo Global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 para editar os estilos do texto de Modelo Global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gundo ní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Quinto ní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Marcador de Posição do Cabeçalho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Marcador de Posição da Data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/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Marcador de Posição da Imagem do Diapositivo 3">
          <svg:title/>
          <svg:desc/>
        </draw:page-thumbnail>
        <draw:frame draw:id="id11" presentation:style-name="a188" draw:name="Marcador de Posição de Notas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que para editar os estilos do texto de Modelo Global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gundo ní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Quinto nível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Marcador de Posição do Rodapé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Marcador de Posição do Número do Diapositivo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Clique para editar o estilo de título do Modelo Global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Marcador de Posição do Cabeçalho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Marcador de Posição da Data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Marcador de Posição da Imagem do Diapositivo 3">
          <svg:title/>
          <svg:desc/>
        </draw:page-thumbnail>
        <draw:frame draw:id="id11" presentation:style-name="a245" draw:name="Marcador de Posição de Notas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que para editar os estilos do texto de Modelo Global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gundo ní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Quinto nível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Marcador de Posição do Rodapé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Marcador de Posição do Número do Diapositivo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54">
      <draw:custom-shape svg:x="0in" svg:y="7in" svg:width="13.33333in" svg:height="0.5in" draw:id="id38" draw:layer="Master1-bg" draw:style-name="a25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que para editar o estilo de título do Modelo Global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s estilos do texto de Modelo Global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gundo ní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ní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ní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Marcador de Posição do Cabeçalho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Marcador de Posição da Data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Marcador de Posição da Imagem do Diapositivo 3">
          <svg:title/>
          <svg:desc/>
        </draw:page-thumbnail>
        <draw:frame draw:id="id11" presentation:style-name="a332" draw:name="Marcador de Posição de Notas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Clique para editar os estilos do texto de Modelo Global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Segundo nível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Quinto nível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Marcador de Posição do Rodapé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Marcador de Posição do Número do Diapositivo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41">
      <draw:custom-shape svg:x="0in" svg:y="7in" svg:width="13.33333in" svg:height="0.5in" draw:id="id47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9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Clique para editar o estilo de título do Modelo Global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que para editar os estilos do texto de Modelo Global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que para editar os estilos do texto de Modelo Global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gundo ní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Quinto ní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que para editar os estilos do texto de Modelo Global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 para editar os estilos do texto de Modelo Global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gundo ní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Quinto ní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Marcador de Posição do Cabeçalho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Marcador de Posição da Data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Marcador de Posição da Imagem do Diapositivo 3">
          <svg:title/>
          <svg:desc/>
        </draw:page-thumbnail>
        <draw:frame draw:id="id11" presentation:style-name="a427" draw:name="Marcador de Posição de Notas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Clique para editar os estilos do texto de Modelo Global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gundo ní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Quinto nível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Marcador de Posição do Rodapé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Marcador de Posição do Número do Diapositivo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36">
      <draw:custom-shape svg:x="0in" svg:y="7in" svg:width="13.33333in" svg:height="0.5in" draw:id="id58" draw:layer="Master1-bg" draw:style-name="a4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9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Clique para editar o estilo de título do Modelo Global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Marcador de Posição do Cabeçalho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Marcador de Posição da Data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Marcador de Posição da Imagem do Diapositivo 3">
          <svg:title/>
          <svg:desc/>
        </draw:page-thumbnail>
        <draw:frame draw:id="id11" presentation:style-name="a480" draw:name="Marcador de Posição de Notas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Clique para editar os estilos do texto de Modelo Global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gundo ní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Quinto nível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Marcador de Posição do Rodapé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Marcador de Posição do Número do Diapositivo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/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Marcador de Posição do Cabeçalho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Marcador de Posição da Data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/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Marcador de Posição da Imagem do Diapositivo 3">
          <svg:title/>
          <svg:desc/>
        </draw:page-thumbnail>
        <draw:frame draw:id="id11" presentation:style-name="a528" draw:name="Marcador de Posição de Notas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Clique para editar os estilos do texto de Modelo Global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gundo ní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Quinto nível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Marcador de Posição do Rodapé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Marcador de Posição do Número do Diapositivo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Clique para editar o estilo de título do Modelo Global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 para editar os estilos do texto de Modelo Global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Segundo nível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Quinto nível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que para editar os estilos do texto de Modelo Global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/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Marcador de Posição do Cabeçalho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Marcador de Posição da Data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/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Marcador de Posição da Imagem do Diapositivo 3">
          <svg:title/>
          <svg:desc/>
        </draw:page-thumbnail>
        <draw:frame draw:id="id11" presentation:style-name="a601" draw:name="Marcador de Posição de Notas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Clique para editar os estilos do texto de Modelo Global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gundo ní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Quinto nível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Marcador de Posição do Rodapé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Marcador de Posição do Número do Diapositivo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in" svg:height="0.9in" presentation:class="title" presentation:placeholder="false">
        <draw:text-box>
          <text:p text:style-name="a615" text:class-names="" text:cond-style-name=""><text:span text:style-name="a613" text:class-names="">Clique para editar o estilo de título do Modelo Global</text:span><text:span text:style-name="a614" text:class-names=""/></text:p>
        </draw:text-box>
        <svg:title/>
        <svg:desc/>
      </draw:frame>
      <draw:frame draw:id="id81" presentation:style-name="a621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Clique no ícone para adicionar uma imagem</text:span><text:span text:style-name="a618" text:class-names=""/></text:p>
        </draw:text-box>
        <svg:title/>
        <svg:desc/>
      </draw:frame>
      <draw:frame draw:id="id82" presentation:style-name="a625" draw:name="Text Placeholder 3" svg:x="1.2in" svg:y="6.46in" svg:width="11.06in" svg:height="0.65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que para editar os estilos do texto de Modelo Global</text:span></text:p>
            </text:list-item>
          </text:list>
        </draw:text-box>
        <svg:title/>
        <svg:desc/>
      </draw:frame>
      <draw:frame draw:id="id83" presentation:style-name="a630" draw:name="Date Placeholder 4" svg:x="1.2in" svg:y="7.06451in" svg:width="2.70371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/></text:span><text:span text:style-name="a628" text:class-names=""/></text:p>
        </draw:text-box>
        <svg:title/>
        <svg:desc/>
      </draw:frame>
      <draw:frame draw:id="id84" presentation:style-name="a633" draw:name="Footer Placeholder 5" svg:x="4.03126in" svg:y="7.06451in" svg:width="5.27428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5" presentation:style-name="a637" draw:name="Slide Number Placeholder 6" svg:x="10.82727in" svg:y="7.06451in" svg:width="1.43485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</draw:text-box>
        <svg:title/>
        <svg:desc/>
      </draw:frame>
      <presentation:notes style:page-layout-name="pageLayout2" draw:style-name="a670">
        <draw:frame draw:id="id8" presentation:style-name="a640" draw:name="Marcador de Posição do Cabeçalho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5" draw:name="Marcador de Posição da Data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/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Marcador de Posição da Imagem do Diapositivo 3">
          <svg:title/>
          <svg:desc/>
        </draw:page-thumbnail>
        <draw:frame draw:id="id11" presentation:style-name="a662" draw:name="Marcador de Posição de Notas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Clique para editar os estilos do texto de Modelo Global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gundo ní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Quinto ní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Marcador de Posição do Rodapé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9" draw:name="Marcador de Posição do Número do Diapositivo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71">
      <draw:custom-shape svg:x="0in" svg:y="7in" svg:width="13.33333in" svg:height="0.5in" draw:id="id86" draw:layer="Master1-bg" draw:style-name="a6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7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4" draw:name="Straight Connector 9">
        <svg:title/>
        <svg:desc/>
      </draw:connector>
      <draw:frame draw:id="id89" presentation:style-name="a678" draw:name="Title 1" svg:x="1.2in" svg:y="0.31343in" svg:width="11in" svg:height="1.58657in" presentation:class="title" presentation:placeholder="false">
        <draw:text-box>
          <text:p text:style-name="a677" text:class-names="" text:cond-style-name=""><text:span text:style-name="a675" text:class-names="">Clique para editar o estilo de título do Modelo Global</text:span><text:span text:style-name="a676" text:class-names=""/></text:p>
        </draw:text-box>
        <svg:title/>
        <svg:desc/>
      </draw:frame>
      <draw:frame draw:id="id90" presentation:style-name="a695" draw:name="Vertical Text Placeholder 2" svg:x="1.2in" svg:y="2.01852in" svg:width="11in" svg:height="4.4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Clique para editar os estilos do texto de Modelo Global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Segundo nível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1" text:class-names="">Quinto nível</text:span><text:span text:style-name="a6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0" draw:name="Date Placeholder 3" svg:x="1.2in" svg:y="7.06451in" svg:width="2.70371in" svg:height="0.39931in" presentation:class="date-time" presentation:placeholder="false">
        <draw:text-box>
          <text:p text:style-name="a699" text:class-names="" text:cond-style-name=""><text:span text:style-name="a696" text:class-names=""><text:date text:fixed="false" style:data-style-name="a697"/></text:span><text:span text:style-name="a698" text:class-names=""/></text:p>
        </draw:text-box>
        <svg:title/>
        <svg:desc/>
      </draw:frame>
      <draw:frame draw:id="id92" presentation:style-name="a703" draw:name="Footer Placeholder 4" svg:x="4.03126in" svg:y="7.06451in" svg:width="5.27428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3" presentation:style-name="a707" draw:name="Slide Number Placeholder 5" svg:x="10.82727in" svg:y="7.06451in" svg:width="1.43485in" svg:height="0.39931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</draw:text-box>
        <svg:title/>
        <svg:desc/>
      </draw:frame>
      <presentation:notes style:page-layout-name="pageLayout2" draw:style-name="a740">
        <draw:frame draw:id="id8" presentation:style-name="a710" draw:name="Marcador de Posição do Cabeçalho 1" svg:x="0in" svg:y="0in" svg:width="3.25in" svg:height="0.50174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" presentation:style-name="a715" draw:name="Marcador de Posição da Data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1" text:class-names=""><text:date text:fixed="false" style:data-style-name="a712"/></text:span><text:span text:style-name="a7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Marcador de Posição da Imagem do Diapositivo 3">
          <svg:title/>
          <svg:desc/>
        </draw:page-thumbnail>
        <draw:frame draw:id="id11" presentation:style-name="a732" draw:name="Marcador de Posição de Notas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Clique para editar os estilos do texto de Modelo Global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egundo nível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Quinto nível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Marcador de Posição do Rodapé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9" draw:name="Marcador de Posição do Número do Diapositivo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/></text:span><text:span text:style-name="a737" text:class-names=""/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741">
      <draw:custom-shape svg:x="0.00347in" svg:y="7in" svg:width="13.32986in" svg:height="0.5in" draw:id="id94" draw:style-name="a7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7" draw:name="Vertical Title 1" svg:x="9.54167in" svg:y="0.45361in" svg:width="2.875in" svg:height="6.29639in" presentation:class="title" presentation:placeholder="false">
        <draw:text-box>
          <text:p text:style-name="a746" text:class-names="" text:cond-style-name=""><text:span text:style-name="a744" text:class-names="">Clique para editar o estilo de título do Modelo Global</text:span><text:span text:style-name="a745" text:class-names=""/></text:p>
        </draw:text-box>
        <svg:title/>
        <svg:desc/>
      </draw:frame>
      <draw:frame draw:id="id97" presentation:style-name="a764" draw:name="Vertical Text Placeholder 2" svg:x="0.91667in" svg:y="0.45361in" svg:width="8.45833in" svg:height="6.29639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que para editar os estilos do texto de Modelo Global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Segundo nível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0" text:class-names="">Quinto nível</text:span><text:span text:style-name="a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9" draw:name="Date Placeholder 3" svg:x="1.2in" svg:y="7.06451in" svg:width="2.70371in" svg:height="0.39931in" presentation:class="date-time" presentation:placeholder="false">
        <draw:text-box>
          <text:p text:style-name="a768" text:class-names="" text:cond-style-name=""><text:span text:style-name="a765" text:class-names=""><text:date text:fixed="false" style:data-style-name="a766"/></text:span><text:span text:style-name="a767" text:class-names=""/></text:p>
        </draw:text-box>
        <svg:title/>
        <svg:desc/>
      </draw:frame>
      <draw:frame draw:id="id99" presentation:style-name="a772" draw:name="Footer Placeholder 4" svg:x="4.03126in" svg:y="7.06451in" svg:width="5.27428in" svg:height="0.39931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00" presentation:style-name="a776" draw:name="Slide Number Placeholder 5" svg:x="10.82727in" svg:y="7.06451in" svg:width="1.43485in" svg:height="0.39931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</draw:text-box>
        <svg:title/>
        <svg:desc/>
      </draw:frame>
      <presentation:notes style:page-layout-name="pageLayout2" draw:style-name="a809">
        <draw:frame draw:id="id8" presentation:style-name="a779" draw:name="Marcador de Posição do Cabeçalho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4" draw:name="Marcador de Posição da Data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/></text:span><text:span text:style-name="a7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Marcador de Posição da Imagem do Diapositivo 3">
          <svg:title/>
          <svg:desc/>
        </draw:page-thumbnail>
        <draw:frame draw:id="id11" presentation:style-name="a801" draw:name="Marcador de Posição de Notas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que para editar os estilos do texto de Modelo Global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gundo ní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Quinto ní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Marcador de Posição do Rodapé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8" draw:name="Marcador de Posição do Número do Diapositivo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/></text:span><text:span text:style-name="a806" text:class-names=""/></text:p>
          </draw:text-box>
          <svg:title/>
          <svg:desc/>
        </draw:frame>
      </presentation:notes>
    </style:master-page>
    <style:master-page style:name="Master2-1_Office-Theme" style:page-layout-name="pageLayout1" draw:style-name="a810">
      <draw:frame draw:id="id101" presentation:style-name="a813" draw:name="Footer Placeholder 15" svg:x="0.5159in" svg:y="7.05912in" svg:width="11.07299in" svg:height="0.24605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02" presentation:style-name="a817" draw:name="Title Placeholder 1" svg:x="0.54217in" svg:y="0.9185in" svg:width="12.28472in" svg:height="0.63157in" presentation:class="title" presentation:placeholder="false">
        <draw:text-box>
          <text:p text:style-name="a816" text:class-names="" text:cond-style-name=""><text:span text:style-name="a814" text:class-names="">Click to edit Master title style</text:span><text:span text:style-name="a815" text:class-names=""/></text:p>
        </draw:text-box>
        <svg:title/>
        <svg:desc/>
      </draw:frame>
      <draw:frame draw:id="id103" presentation:style-name="a834" draw:name="Text Placeholder 2" svg:x="0.53324in" svg:y="1.82967in" svg:width="12.26686in" svg:height="5.06963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Click to edit Master text styles</text:span></text:p>
            </text:list-item>
          </text:list>
          <text:list text:style-name="a823">
            <text:list-item>
              <text:list text:style-name="a823">
                <text:list-item>
                  <text:p text:style-name="a822" text:class-names="" text:cond-style-name=""><text:span text:style-name="a821" text:class-names="">Second level</text:span></text:p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p text:style-name="a825" text:class-names="" text:cond-style-name=""><text:span text:style-name="a824" text:class-names="">Third level</text:span></text:p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p text:style-name="a828" text:class-names="" text:cond-style-name=""><text:span text:style-name="a8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list text:style-name="a833">
                            <text:list-item>
                              <text:p text:style-name="a832" text:class-names="" text:cond-style-name=""><text:span text:style-name="a830" text:class-names="">Fifth level</text:span><text:span text:style-name="a8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39" draw:name="Slide Number Placeholder 5" svg:x="12.07229in" svg:y="7.05912in" svg:width="0.73674in" svg:height="0.23959in" presentation:class="page-number" presentation:placeholder="false">
        <draw:text-box>
          <text:p text:style-name="a838" text:class-names="" text:cond-style-name=""><text:span text:style-name="a835" text:class-names=""><text:s text:c="1"/>| <text:s text:c="1"/></text:span><text:span text:style-name="a836" text:class-names=""><text:page-number style:num-format="1" text:fixed="false">‹nº›</text:page-number></text:span><text:span text:style-name="a837" text:class-names=""/></text:p>
        </draw:text-box>
        <svg:title/>
        <svg:desc/>
      </draw:frame>
      <draw:frame draw:id="id105" draw:style-name="a840" draw:name="Graphic 8" svg:x="12.28101in" svg:y="0.29749in" svg:width="0.54588in" svg:height="0.3872in" style:rel-width="scale" style:rel-height="scale">
        <draw:image xlink:href="media/image2.svg" xlink:type="simple" xlink:show="embed" xlink:actuate="onLoad"/>
        <svg:title/>
        <svg:desc/>
      </draw:frame>
      <presentation:notes style:page-layout-name="pageLayout2" draw:style-name="a873">
        <draw:frame draw:id="id8" presentation:style-name="a843" draw:name="Marcador de Posição do Cabeçalho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9" presentation:style-name="a848" draw:name="Marcador de Posição da Data 2" svg:x="4.24826in" svg:y="0in" svg:width="3.25in" svg:height="0.50174in" presentation:class="date-time" presentation:placeholder="false">
          <draw:text-box>
            <text:p text:style-name="a847" text:class-names="" text:cond-style-name=""><text:span text:style-name="a844" text:class-names=""><text:date text:fixed="false" style:data-style-name="a845"/></text:span><text:span text:style-name="a8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49" draw:name="Marcador de Posição da Imagem do Diapositivo 3">
          <svg:title/>
          <svg:desc/>
        </draw:page-thumbnail>
        <draw:frame draw:id="id11" presentation:style-name="a865" draw:name="Marcador de Posição de Notas 4" svg:x="0.75in" svg:y="4.8125in" svg:width="6in" svg:height="3.9375in" presentation:class="notes" presentation:placeholder="false">
          <draw:text-box>
            <text:p text:style-name="a851" text:class-names="" text:cond-style-name=""><text:span text:style-name="a850" text:class-names="">Clique para editar os estilos do texto de Modelo Global</text:span></text:p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Segundo nível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p text:style-name="a856" text:class-names="" text:cond-style-name=""><text:span text:style-name="a85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p text:style-name="a859" text:class-names="" text:cond-style-name=""><text:span text:style-name="a85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list text:style-name="a864">
                              <text:list-item>
                                <text:p text:style-name="a863" text:class-names="" text:cond-style-name=""><text:span text:style-name="a861" text:class-names="">Quinto nível</text:span><text:span text:style-name="a8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68" draw:name="Marcador de Posição do Rodapé 5" svg:x="0in" svg:y="9.49826in" svg:width="3.25in" svg:height="0.50174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3" presentation:style-name="a872" draw:name="Marcador de Posição do Número do Diapositivo 6" svg:x="4.24826in" svg:y="9.49826in" svg:width="3.25in" svg:height="0.50174in" presentation:class="page-number" presentation:placeholder="false">
          <draw:text-box>
            <text:p text:style-name="a871" text:class-names="" text:cond-style-name=""><text:span text:style-name="a869" text:class-names=""><text:page-number style:num-format="1" text:fixed="false"/></text:span><text:span text:style-name="a870" text:class-names=""/></text:p>
          </draw:text-box>
          <svg:title/>
          <svg:desc/>
        </draw:frame>
      </presentation:notes>
    </style:master-page>
    <style:master-page style:name="Master2-Layout1-cust-Separator_2" style:page-layout-name="pageLayout1" draw:style-name="a874">
      <draw:frame draw:id="id106" draw:layer="Master2-bg" draw:style-name="a875" draw:name="Graphic 8" svg:x="12.28101in" svg:y="0.29749in" svg:width="0.54588in" svg:height="0.3872in" style:rel-width="scale" style:rel-height="scale">
        <draw:image xlink:href="media/image2.svg" xlink:type="simple" xlink:show="embed" xlink:actuate="onLoad"/>
        <svg:title/>
        <svg:desc/>
      </draw:frame>
      <draw:frame draw:id="id107" presentation:style-name="a879" draw:name="Text Placeholder 14" svg:x="4.33013in" svg:y="4.38889in" svg:width="4.73656in" svg:height="0.40391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TITLE</text:span></text:p>
            </text:list-item>
          </text:list>
        </draw:text-box>
        <svg:title/>
        <svg:desc/>
      </draw:frame>
      <draw:frame draw:id="id108" presentation:style-name="a883" draw:name="Text Placeholder 14" svg:x="4.33013in" svg:y="2.59524in" svg:width="4.73656in" svg:height="1.55504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Nº</text:span></text:p>
            </text:list-item>
          </text:list>
        </draw:text-box>
        <svg:title/>
        <svg:desc/>
      </draw:frame>
      <draw:frame draw:id="id109" presentation:style-name="a888" draw:name="Slide Number Placeholder 5" svg:x="12.07229in" svg:y="7.05912in" svg:width="0.73674in" svg:height="0.23959in" presentation:class="page-number" presentation:placeholder="false">
        <draw:text-box>
          <text:p text:style-name="a887" text:class-names="" text:cond-style-name=""><text:span text:style-name="a884" text:class-names=""><text:s text:c="1"/>| <text:s text:c="1"/></text:span><text:span text:style-name="a885" text:class-names=""><text:page-number style:num-format="1" text:fixed="false">‹nº›</text:page-number></text:span><text:span text:style-name="a886" text:class-names=""/></text:p>
        </draw:text-box>
        <svg:title/>
        <svg:desc/>
      </draw:frame>
      <presentation:notes style:page-layout-name="pageLayout2" draw:style-name="a921">
        <draw:frame draw:id="id8" presentation:style-name="a891" draw:name="Marcador de Posição do Cabeçalho 1" svg:x="0in" svg:y="0in" svg:width="3.25in" svg:height="0.50174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9" presentation:style-name="a896" draw:name="Marcador de Posição da Data 2" svg:x="4.24826in" svg:y="0in" svg:width="3.25in" svg:height="0.50174in" presentation:class="date-time" presentation:placeholder="false">
          <draw:text-box>
            <text:p text:style-name="a895" text:class-names="" text:cond-style-name=""><text:span text:style-name="a892" text:class-names=""><text:date text:fixed="false" style:data-style-name="a893"/></text:span><text:span text:style-name="a89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97" draw:name="Marcador de Posição da Imagem do Diapositivo 3">
          <svg:title/>
          <svg:desc/>
        </draw:page-thumbnail>
        <draw:frame draw:id="id11" presentation:style-name="a913" draw:name="Marcador de Posição de Notas 4" svg:x="0.75in" svg:y="4.8125in" svg:width="6in" svg:height="3.9375in" presentation:class="notes" presentation:placeholder="false">
          <draw:text-box>
            <text:p text:style-name="a899" text:class-names="" text:cond-style-name=""><text:span text:style-name="a898" text:class-names="">Clique para editar os estilos do texto de Modelo Global</text:span></text:p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Segundo nível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p text:style-name="a904" text:class-names="" text:cond-style-name=""><text:span text:style-name="a9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p text:style-name="a907" text:class-names="" text:cond-style-name=""><text:span text:style-name="a9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list text:style-name="a912">
                              <text:list-item>
                                <text:p text:style-name="a911" text:class-names="" text:cond-style-name=""><text:span text:style-name="a909" text:class-names="">Quinto nível</text:span><text:span text:style-name="a9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16" draw:name="Marcador de Posição do Rodapé 5" svg:x="0in" svg:y="9.49826in" svg:width="3.25in" svg:height="0.50174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3" presentation:style-name="a920" draw:name="Marcador de Posição do Número do Diapositivo 6" svg:x="4.24826in" svg:y="9.49826in" svg:width="3.25in" svg:height="0.50174in" presentation:class="page-number" presentation:placeholder="false">
          <draw:text-box>
            <text:p text:style-name="a919" text:class-names="" text:cond-style-name=""><text:span text:style-name="a917" text:class-names=""><text:page-number style:num-format="1" text:fixed="false"/></text:span><text:span text:style-name="a91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DIOGO PAULO RODRIGUES</meta:initial-creator>
    <dc:creator>DIOGO PAULO RODRIGUES</dc:creator>
    <meta:creation-date>2022-04-18T08:19:04Z</meta:creation-date>
    <dc:date>2022-04-18T10:48:19Z</dc:date>
    <meta:template xlink:href="Retrospect" xlink:type="simple"/>
    <meta:editing-cycles>12</meta:editing-cycles>
    <meta:editing-duration>PT8955S</meta:editing-duration>
    <meta:user-defined meta:name="MSIP_Label_9811530c-902c-4b75-8616-d6c82cd1332a_Enabled">true</meta:user-defined>
    <meta:user-defined meta:name="MSIP_Label_9811530c-902c-4b75-8616-d6c82cd1332a_SetDate">2022-04-18T10:01:54Z</meta:user-defined>
    <meta:user-defined meta:name="MSIP_Label_9811530c-902c-4b75-8616-d6c82cd1332a_Method">Standard</meta:user-defined>
    <meta:user-defined meta:name="MSIP_Label_9811530c-902c-4b75-8616-d6c82cd1332a_Name">9811530c-902c-4b75-8616-d6c82cd1332a</meta:user-defined>
    <meta:user-defined meta:name="MSIP_Label_9811530c-902c-4b75-8616-d6c82cd1332a_SiteId">bf86fbdb-f8c2-440e-923c-05a60dc2bc9b</meta:user-defined>
    <meta:user-defined meta:name="MSIP_Label_9811530c-902c-4b75-8616-d6c82cd1332a_ActionId">34b9675f-6115-4bd1-8a1a-52c4b62d1a32</meta:user-defined>
    <meta:user-defined meta:name="MSIP_Label_9811530c-902c-4b75-8616-d6c82cd1332a_ContentBits">0</meta:user-defined>
    <meta:document-statistic meta:paragraph-count="57" meta:word-count="112"/>
  </office:meta>
</office:document-meta>
</file>